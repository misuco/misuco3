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1.5366in"/>
    </style:style>
    <style:style style:name="co7" style:family="table-column">
      <style:table-column-properties fo:break-before="auto" style:column-width="0.4736in"/>
    </style:style>
    <style:style style:name="co8" style:family="table-column">
      <style:table-column-properties fo:break-before="auto" style:column-width="1.4563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itch Cent</text:p>
          </table:table-cell>
          <table:table-cell office:value-type="string" calcext:value-type="string">
            <text:p>Midino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in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in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ino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11]*(2^((([.E2]+3)*100+[.$B2])/1200))" office:value-type="float" office:value="8.17579891564371" calcext:value-type="float">
            <text:p>8.17579891564371</text:p>
          </table:table-cell>
          <table:table-cell office:value-type="float" office:value="12" calcext:value-type="float">
            <text:p>12</text:p>
          </table:table-cell>
          <table:table-cell table:formula="of:=[.$D$11]*(2^((([.G2]+3)*100+[.$B2])/1200))" office:value-type="float" office:value="16.3515978312874" calcext:value-type="float">
            <text:p>16.3515978312874</text:p>
          </table:table-cell>
          <table:table-cell office:value-type="float" office:value="24" calcext:value-type="float">
            <text:p>24</text:p>
          </table:table-cell>
          <table:table-cell table:formula="of:=[.$D$11]*(2^((([.I2]+3)*100+[.$B2])/1200))" office:value-type="float" office:value="32.7031956625748" calcext:value-type="float">
            <text:p>32.7031956625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11]*(2^((([.E3]+3)*100+[.$B3])/1200))" office:value-type="float" office:value="8.66195721802725" calcext:value-type="float">
            <text:p>8.66195721802725</text:p>
          </table:table-cell>
          <table:table-cell office:value-type="float" office:value="13" calcext:value-type="float">
            <text:p>13</text:p>
          </table:table-cell>
          <table:table-cell table:formula="of:=[.$D$11]*(2^((([.G3]+3)*100+[.$B3])/1200))" office:value-type="float" office:value="17.3239144360545" calcext:value-type="float">
            <text:p>17.3239144360545</text:p>
          </table:table-cell>
          <table:table-cell office:value-type="float" office:value="25" calcext:value-type="float">
            <text:p>25</text:p>
          </table:table-cell>
          <table:table-cell table:formula="of:=[.$D$11]*(2^((([.I3]+3)*100+[.$B3])/1200))" office:value-type="float" office:value="34.647828872109" calcext:value-type="float">
            <text:p>34.647828872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11]*(2^((([.E4]+3)*100+[.$B4])/1200))" office:value-type="float" office:value="9.17702399741899" calcext:value-type="float">
            <text:p>9.17702399741899</text:p>
          </table:table-cell>
          <table:table-cell office:value-type="float" office:value="14" calcext:value-type="float">
            <text:p>14</text:p>
          </table:table-cell>
          <table:table-cell table:formula="of:=[.$D$11]*(2^((([.G4]+3)*100+[.$B4])/1200))" office:value-type="float" office:value="18.354047994838" calcext:value-type="float">
            <text:p>18.354047994838</text:p>
          </table:table-cell>
          <table:table-cell office:value-type="float" office:value="26" calcext:value-type="float">
            <text:p>26</text:p>
          </table:table-cell>
          <table:table-cell table:formula="of:=[.$D$11]*(2^((([.I4]+3)*100+[.$B4])/1200))" office:value-type="float" office:value="36.7080959896759" calcext:value-type="float">
            <text:p>36.7080959896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11]*(2^((([.E5]+3)*100+[.$B5])/1200))" office:value-type="float" office:value="9.72271824131503" calcext:value-type="float">
            <text:p>9.72271824131503</text:p>
          </table:table-cell>
          <table:table-cell office:value-type="float" office:value="15" calcext:value-type="float">
            <text:p>15</text:p>
          </table:table-cell>
          <table:table-cell table:formula="of:=[.$D$11]*(2^((([.G5]+3)*100+[.$B5])/1200))" office:value-type="float" office:value="19.4454364826301" calcext:value-type="float">
            <text:p>19.4454364826301</text:p>
          </table:table-cell>
          <table:table-cell office:value-type="float" office:value="27" calcext:value-type="float">
            <text:p>27</text:p>
          </table:table-cell>
          <table:table-cell table:formula="of:=[.$D$11]*(2^((([.I5]+3)*100+[.$B5])/1200))" office:value-type="float" office:value="38.8908729652601" calcext:value-type="float">
            <text:p>38.8908729652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11]*(2^((([.E6]+3)*100+[.$B6])/1200))" office:value-type="float" office:value="10.3008611535272" calcext:value-type="float">
            <text:p>10.3008611535272</text:p>
          </table:table-cell>
          <table:table-cell office:value-type="float" office:value="16" calcext:value-type="float">
            <text:p>16</text:p>
          </table:table-cell>
          <table:table-cell table:formula="of:=[.$D$11]*(2^((([.G6]+3)*100+[.$B6])/1200))" office:value-type="float" office:value="20.6017223070544" calcext:value-type="float">
            <text:p>20.6017223070544</text:p>
          </table:table-cell>
          <table:table-cell office:value-type="float" office:value="28" calcext:value-type="float">
            <text:p>28</text:p>
          </table:table-cell>
          <table:table-cell table:formula="of:=[.$D$11]*(2^((([.I6]+3)*100+[.$B6])/1200))" office:value-type="float" office:value="41.2034446141088" calcext:value-type="float">
            <text:p>41.203444614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D$11]*(2^((([.E7]+3)*100+[.$B7])/1200))" office:value-type="float" office:value="10.9133822322814" calcext:value-type="float">
            <text:p>10.9133822322814</text:p>
          </table:table-cell>
          <table:table-cell office:value-type="float" office:value="17" calcext:value-type="float">
            <text:p>17</text:p>
          </table:table-cell>
          <table:table-cell table:formula="of:=[.$D$11]*(2^((([.G7]+3)*100+[.$B7])/1200))" office:value-type="float" office:value="21.8267644645627" calcext:value-type="float">
            <text:p>21.8267644645627</text:p>
          </table:table-cell>
          <table:table-cell office:value-type="float" office:value="29" calcext:value-type="float">
            <text:p>29</text:p>
          </table:table-cell>
          <table:table-cell table:formula="of:=[.$D$11]*(2^((([.I7]+3)*100+[.$B7])/1200))" office:value-type="float" office:value="43.6535289291255" calcext:value-type="float">
            <text:p>43.653528929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D$11]*(2^((([.E8]+3)*100+[.$B8])/1200))" office:value-type="float" office:value="11.5623257097386" calcext:value-type="float">
            <text:p>11.5623257097386</text:p>
          </table:table-cell>
          <table:table-cell office:value-type="float" office:value="18" calcext:value-type="float">
            <text:p>18</text:p>
          </table:table-cell>
          <table:table-cell table:formula="of:=[.$D$11]*(2^((([.G8]+3)*100+[.$B8])/1200))" office:value-type="float" office:value="23.1246514194772" calcext:value-type="float">
            <text:p>23.1246514194772</text:p>
          </table:table-cell>
          <table:table-cell office:value-type="float" office:value="30" calcext:value-type="float">
            <text:p>30</text:p>
          </table:table-cell>
          <table:table-cell table:formula="of:=[.$D$11]*(2^((([.I8]+3)*100+[.$B8])/1200))" office:value-type="float" office:value="46.2493028389543" calcext:value-type="float">
            <text:p>46.2493028389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D$11]*(2^((([.E9]+3)*100+[.$B9])/1200))" office:value-type="float" office:value="12.2498573744297" calcext:value-type="float">
            <text:p>12.2498573744297</text:p>
          </table:table-cell>
          <table:table-cell office:value-type="float" office:value="19" calcext:value-type="float">
            <text:p>19</text:p>
          </table:table-cell>
          <table:table-cell table:formula="of:=[.$D$11]*(2^((([.G9]+3)*100+[.$B9])/1200))" office:value-type="float" office:value="24.4997147488593" calcext:value-type="float">
            <text:p>24.4997147488593</text:p>
          </table:table-cell>
          <table:table-cell office:value-type="float" office:value="31" calcext:value-type="float">
            <text:p>31</text:p>
          </table:table-cell>
          <table:table-cell table:formula="of:=[.$D$11]*(2^((([.I9]+3)*100+[.$B9])/1200))" office:value-type="float" office:value="48.9994294977187" calcext:value-type="float">
            <text:p>48.9994294977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D$11]*(2^((([.E10]+3)*100+[.$B10])/1200))" office:value-type="float" office:value="12.9782717993733" calcext:value-type="float">
            <text:p>12.9782717993733</text:p>
          </table:table-cell>
          <table:table-cell office:value-type="float" office:value="20" calcext:value-type="float">
            <text:p>20</text:p>
          </table:table-cell>
          <table:table-cell table:formula="of:=[.$D$11]*(2^((([.G10]+3)*100+[.$B10])/1200))" office:value-type="float" office:value="25.9565435987466" calcext:value-type="float">
            <text:p>25.9565435987466</text:p>
          </table:table-cell>
          <table:table-cell office:value-type="float" office:value="32" calcext:value-type="float">
            <text:p>32</text:p>
          </table:table-cell>
          <table:table-cell table:formula="of:=[.$D$11]*(2^((([.I10]+3)*100+[.$B10])/1200))" office:value-type="float" office:value="51.9130871974931" calcext:value-type="float">
            <text:p>51.9130871974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3" table:formula="of:=440/64" office:value-type="float" office:value="6.875" calcext:value-type="float">
            <text:p>6.875</text:p>
          </table:table-cell>
          <table:table-cell office:value-type="float" office:value="9" calcext:value-type="float">
            <text:p>9</text:p>
          </table:table-cell>
          <table:table-cell table:formula="of:=[.$D$11]*(2^((([.E11]+3)*100+[.$B11])/1200))" office:value-type="float" office:value="13.75" calcext:value-type="float">
            <text:p>13.75</text:p>
          </table:table-cell>
          <table:table-cell office:value-type="float" office:value="21" calcext:value-type="float">
            <text:p>21</text:p>
          </table:table-cell>
          <table:table-cell table:formula="of:=[.$D$11]*(2^((([.G11]+3)*100+[.$B11])/1200))" office:value-type="float" office:value="27.5" calcext:value-type="float">
            <text:p>27.5</text:p>
          </table:table-cell>
          <table:table-cell office:value-type="float" office:value="33" calcext:value-type="float">
            <text:p>33</text:p>
          </table:table-cell>
          <table:table-cell table:formula="of:=[.$D$11]*(2^((([.I11]+3)*100+[.$B11])/1200))"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table:style-name="ce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D$11]*(2^((([.E12]+3)*100+[.$B12])/1200))" office:value-type="float" office:value="14.5676175474403" calcext:value-type="float">
            <text:p>14.5676175474403</text:p>
          </table:table-cell>
          <table:table-cell office:value-type="float" office:value="22" calcext:value-type="float">
            <text:p>22</text:p>
          </table:table-cell>
          <table:table-cell table:formula="of:=[.$D$11]*(2^((([.G12]+3)*100+[.$B12])/1200))" office:value-type="float" office:value="29.1352350948806" calcext:value-type="float">
            <text:p>29.1352350948806</text:p>
          </table:table-cell>
          <table:table-cell office:value-type="float" office:value="34" calcext:value-type="float">
            <text:p>34</text:p>
          </table:table-cell>
          <table:table-cell table:formula="of:=[.$D$11]*(2^((([.I12]+3)*100+[.$B12])/1200))" office:value-type="float" office:value="58.2704701897612" calcext:value-type="float">
            <text:p>58.2704701897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D$11]*(2^((([.E13]+3)*100+[.$B13])/1200))" office:value-type="float" office:value="15.4338531642539" calcext:value-type="float">
            <text:p>15.4338531642539</text:p>
          </table:table-cell>
          <table:table-cell office:value-type="float" office:value="23" calcext:value-type="float">
            <text:p>23</text:p>
          </table:table-cell>
          <table:table-cell table:formula="of:=[.$D$11]*(2^((([.G13]+3)*100+[.$B13])/1200))" office:value-type="float" office:value="30.8677063285078" calcext:value-type="float">
            <text:p>30.8677063285078</text:p>
          </table:table-cell>
          <table:table-cell office:value-type="float" office:value="35" calcext:value-type="float">
            <text:p>35</text:p>
          </table:table-cell>
          <table:table-cell table:formula="of:=[.$D$11]*(2^((([.I13]+3)*100+[.$B13])/1200))" office:value-type="float" office:value="61.7354126570155" calcext:value-type="float">
            <text:p>61.7354126570155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Freq = 440/64 * ((NoteValue+3)*100+pitchInCent)*1200wurzel2</text:p>
          </table:table-cell>
          <table:table-cell table:number-columns-repeated="13"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9T12:04:36.159000000</meta:creation-date>
    <dc:date>2026-06-29T12:37:42.678000000</dc:date>
    <meta:editing-duration>PT10M6S</meta:editing-duration>
    <meta:editing-cycles>4</meta:editing-cycles>
    <meta:generator>LibreOffice/24.2.5.2$Windows_X86_64 LibreOffice_project/bffef4ea93e59bebbeaf7f431bb02b1a39ee8a59</meta:generator>
    <meta:document-statistic meta:table-count="1" meta:cell-count="111" meta:object-count="0"/>
  </office:meta>
</office:document-meta>
</file>