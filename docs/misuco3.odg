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C000003627BA167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2cm" fo:min-width="2.87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3.13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Arrowheads_20_2" draw:marker-end="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start="Arrowheads_20_2" draw:marker-end="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stroke="dash" draw:stroke-dash="Double_20_Dash" svg:stroke-color="#000000" draw:marker-end="Arrowheads_20_5" draw:marker-end-width="0.3cm" svg:stroke-linecap="butt" draw:fill="none" draw:textarea-vertical-align="middle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.512cm" fo:min-width="2.8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.512cm" fo:min-width="2.8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3.052cm" fo:min-width="6.48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3.052cm" fo:min-width="6.48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.512cm" fo:min-width="2.8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.512cm" fo:min-width="2.8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.512cm" fo:min-width="2.8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 style:writing-mode="lr-tb"/>
      <style:text-properties fo:font-size="10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77cm" svg:height="0.762cm" svg:x="11.159cm" svg:y="7.015cm">
          <text:p text:style-name="P1"><text:span text:style-name="T1">qt68wrap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37cm" svg:height="0.952cm" svg:x="8.302cm" svg:y="10.508cm">
          <text:p text:style-name="P1"><text:span text:style-name="T1">VoiceMap::V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637cm" svg:height="0.952cm" svg:x="14.407cm" svg:y="10.508cm">
          <text:p text:style-name="P1"><text:span text:style-name="T1">Syctl::Vec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095cm" svg:x1="12.847cm" svg:y1="7.777cm" svg:x2="10.12cm" svg:y2="10.508cm" draw:start-shape="id1" draw:start-glue-point="2" draw:end-shape="id2" draw:end-glue-point="0" svg:d="M12847 7777v1461h-2727v1270" svg:viewBox="0 0 2728 2732">
          <text:p/>
        </draw:connector>
        <draw:connector draw:style-name="gr3" draw:text-style-name="P3" draw:layer="layout" svg:x1="12.847cm" svg:y1="5.68cm" svg:x2="12.847cm" svg:y2="7.015cm" draw:start-shape="id3" draw:start-glue-point="2" draw:end-shape="id1" draw:end-glue-point="0" svg:d="M12847 5680v1335" svg:viewBox="0 0 1 1336">
          <text:p/>
        </draw:connector>
        <draw:custom-shape draw:style-name="gr2" draw:text-style-name="P2" xml:id="id5" draw:id="id5" draw:layer="layout" svg:width="3.637cm" svg:height="0.952cm" svg:x="14.407cm" svg:y="13.366cm">
          <text:p text:style-name="P1"><text:span text:style-name="T1">Synth::Controll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6.225cm" svg:y1="11.46cm" svg:x2="16.225cm" svg:y2="13.366cm" draw:start-shape="id4" draw:start-glue-point="2" draw:end-shape="id5" draw:end-glue-point="0" svg:d="M16225 11460v1906" svg:viewBox="0 0 1 1907">
          <text:p text:style-name="P4"><text:span text:style-name="T2"><text:s text:c="2"/></text:span><text:span text:style-name="T1"><text:s text:c="7"/>1</text:span></text:p>
          <text:p text:style-name="P4"><text:span text:style-name="T1"/></text:p>
          <text:p text:style-name="P4"><text:span text:style-name="T1"/></text:p>
          <text:p text:style-name="P4"><text:span text:style-name="T1"><text:s text:c="23"/>VoiceCount</text:span></text:p>
        </draw:connector>
        <draw:custom-shape draw:style-name="gr2" draw:text-style-name="P2" xml:id="id6" draw:id="id6" draw:layer="layout" svg:width="3.637cm" svg:height="0.952cm" svg:x="8.302cm" svg:y="13.383cm">
          <text:p text:style-name="P1"><text:span text:style-name="T1">VoiceId (1...n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12cm" svg:y1="11.46cm" svg:x2="10.12cm" svg:y2="13.383cm" draw:start-shape="id2" draw:start-glue-point="2" draw:end-shape="id6" draw:end-glue-point="0" svg:d="M10120 11460v1923" svg:viewBox="0 0 1 1924">
          <text:p text:style-name="P4"><text:span text:style-name="T1"><text:s text:c="9"/>1</text:span></text:p>
          <text:p text:style-name="P6"><text:span text:style-name="T1"/></text:p>
          <text:p text:style-name="P6"><text:span text:style-name="T1"/></text:p>
          <text:p text:style-name="P6"><text:span text:style-name="T1"><text:s text:c="23"/>VoiceCount</text:span></text:p>
        </draw:connector>
        <draw:connector draw:style-name="gr5" draw:text-style-name="P7" draw:layer="layout" draw:type="line" svg:x1="11.939cm" svg:y1="13.859cm" svg:x2="14.407cm" svg:y2="13.842cm" draw:start-shape="id6" draw:start-glue-point="1" draw:end-shape="id5" draw:end-glue-point="3" svg:d="M11939 13859l2468-17" svg:viewBox="0 0 2469 18">
          <text:p/>
        </draw:connector>
        <draw:custom-shape draw:style-name="gr1" draw:text-style-name="P2" xml:id="id3" draw:id="id3" draw:layer="layout" svg:width="3.377cm" svg:height="0.762cm" svg:x="11.159cm" svg:y="4.918cm">
          <text:p text:style-name="P1"><text:span text:style-name="T1">MobileSynt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156cm" svg:x1="12.847cm" svg:y1="7.777cm" svg:x2="16.176cm" svg:y2="10.509cm" draw:start-shape="id1" draw:start-glue-point="2" svg:d="M12847 7777v1461h3329v1271" svg:viewBox="0 0 3330 2733">
          <text:p/>
        </draw:connector>
        <draw:custom-shape draw:style-name="gr1" draw:text-style-name="P2" xml:id="id7" draw:id="id7" draw:layer="layout" svg:width="3.377cm" svg:height="0.762cm" svg:x="6.397cm" svg:y="2.587cm">
          <text:p text:style-name="P1"><text:span text:style-name="T1">Main.q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377cm" svg:height="0.762cm" svg:x="2.905cm" svg:y="5cm">
          <text:p text:style-name="P1"><text:span text:style-name="T1">VoiceControl.j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041cm" svg:x1="8.085cm" svg:y1="3.349cm" svg:x2="12.847cm" svg:y2="4.918cm" draw:start-shape="id7" draw:start-glue-point="2" draw:end-shape="id3" draw:end-glue-point="0" svg:d="M8085 3349v826h4762v743" svg:viewBox="0 0 4763 1570">
          <text:p/>
        </draw:connector>
        <draw:connector draw:style-name="gr3" draw:text-style-name="P3" draw:layer="layout" svg:x1="8.085cm" svg:y1="3.349cm" svg:x2="4.593cm" svg:y2="5cm" draw:start-shape="id7" draw:start-glue-point="2" draw:end-shape="id8" draw:end-glue-point="0" svg:d="M8085 3349v826h-3492v825" svg:viewBox="0 0 3493 1652">
          <text:p/>
        </draw:connector>
        <draw:connector draw:style-name="gr6" draw:text-style-name="P8" draw:layer="layout" svg:x1="4.593cm" svg:y1="5.762cm" svg:x2="8.302cm" svg:y2="13.859cm" draw:start-shape="id8" draw:start-glue-point="2" draw:end-shape="id6" draw:end-glue-point="3" svg:d="M4593 5762v8097h3709" svg:viewBox="0 0 3710 8098">
          <text:p text:style-name="P6"><text:span text:style-name="T3">getNextVoiceId()</text:span></text:p>
        </draw:connector>
      </draw:page>
      <draw:page draw:name="page2" draw:style-name="dp1" draw:master-page-name="Default">
        <draw:custom-shape draw:style-name="gr7" draw:text-style-name="P10" draw:layer="controls" svg:width="3.377cm" svg:height="0.762cm" svg:x="1.635cm" svg:y="3.73cm">
          <text:p text:style-name="P9"><text:span text:style-name="T2">MobileSynth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controls" svg:width="3.377cm" svg:height="0.762cm" svg:x="6.08cm" svg:y="5.127cm">
          <text:p text:style-name="P9"><text:span text:style-name="T2">deviceChanged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controls" svg:width="6.985cm" svg:height="3.302cm" svg:x="1.635cm" svg:y="6.715cm">
          <text:p text:style-name="P11"><text:span text:style-name="T2">InitializeAudio</text:span></text:p>
          <text:p text:style-name="P11"><text:span text:style-name="T2">- new QaudioSink</text:span></text:p>
          <text:p text:style-name="P11"><text:span text:style-name="T2">- generator-&gt;setFormat</text:span></text:p>
          <text:p text:style-name="P11"><text:span text:style-name="T2">- audioOutput-&gt;setBufferSize</text:span></text:p>
          <text:p text:style-name="P11"><text:span text:style-name="T2">- generator-&gt;st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controls" svg:width="6.985cm" svg:height="3.302cm" svg:x="1.635cm" svg:y="10.715cm">
          <text:p text:style-name="P11"><text:span text:style-name="T2">pull_mode</text:span></text:p>
          <text:p text:style-name="P11"><text:span text:style-name="T2">- audioOutput-&gt;reset</text:span></text:p>
          <text:p text:style-name="P11"><text:span text:style-name="T2">- audioOutput-&gt;resume</text:span></text:p>
          <text:p text:style-name="P11"><text:span text:style-name="T2">- audioOutput-&gt;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controls" svg:width="3.377cm" svg:height="0.762cm" svg:x="1.635cm" svg:y="5.127cm">
          <text:p text:style-name="P9"><text:span text:style-name="T2">constru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controls" svg:width="3.377cm" svg:height="0.762cm" svg:x="10.005cm" svg:y="5.127cm">
          <text:p text:style-name="P9"><text:span text:style-name="T2">pullChange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controls" svg:width="3.377cm" svg:height="0.762cm" svg:x="14.017cm" svg:y="5.127cm">
          <text:p text:style-name="P9"><text:span text:style-name="T2">buffSizeChanged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4" draw:text-style-name="P7" draw:layer="layout" svg:width="13.188cm" svg:height="10.856cm" svg:x="0.605cm" svg:y="0.186cm">
          <draw:image xlink:href="Pictures/100000010000041C000003627BA167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3000 6000" svg:d="M1500 0l1500 3000-1500 3000-1500-300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5T09:17:00.864000000</meta:creation-date>
    <dc:date>2026-07-07T18:25:22.205727174</dc:date>
    <meta:editing-duration>PT6H25M41S</meta:editing-duration>
    <meta:editing-cycles>9</meta:editing-cycles>
    <meta:generator>LibreOffice/25.2.3.2$Linux_X86_64 LibreOffice_project/520$Build-2</meta:generator>
    <meta:document-statistic meta:object-count="25"/>
  </office:meta>
</office:document-meta>
</file>